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itle" style:family="paragraph">
      <style:text-properties fo:font-size="20pt" fo:font-weight="bold"/>
    </style:style>
    <style:style style:name="Heading1" style:family="paragraph">
      <style:text-properties fo:font-size="16pt" fo:font-weight="bold"/>
    </style:style>
    <style:style style:name="Heading2" style:family="paragraph">
      <style:text-properties fo:font-size="13pt" fo:font-weight="bold"/>
    </style:style>
    <style:style style:name="P1" style:family="paragraph">
      <style:text-properties fo:font-size="11pt"/>
    </style:style>
  </office:automatic-styles>
  <office:body>
    <office:text>
      <text:h text:style-name="Title" text:outline-level="1">Colinha Flutter Web: Widgets Uteis</text:h>
      <text:p text:style-name="P1">Resumo simples para consultar durante a migracao do projeto Bikcraft para Flutter Web.</text:p>
      <text:h text:style-name="Heading2" text:outline-level="2">LayoutBuilder</text:h>
      <text:p text:style-name="P1">Permite mudar o layout com base no espaco disponivel do widget. Otimo para alternar entre desktop, tablet e mobile.</text:p>
      <text:h text:style-name="Heading2" text:outline-level="2">SingleChildScrollView</text:h>
      <text:p text:style-name="P1">Cria uma area com scroll. Muito usado em paginas longas, como landing pages e sites institucionais.</text:p>
      <text:h text:style-name="Heading2" text:outline-level="2">ConstrainedBox</text:h>
      <text:p text:style-name="P1">Define limites minimos ou maximos de tamanho. Na web, e perfeito para simular max-width.</text:p>
      <text:h text:style-name="Heading2" text:outline-level="2">Center</text:h>
      <text:p text:style-name="P1">Centraliza o conteudo. Muito usado junto com ConstrainedBox para manter o conteudo no meio da tela.</text:p>
      <text:h text:style-name="Heading2" text:outline-level="2">Wrap</text:h>
      <text:p text:style-name="P1">Organiza os filhos em linha e quebra para a proxima linha quando nao couberem. Parece com flex-wrap do CSS.</text:p>
      <text:h text:style-name="Heading2" text:outline-level="2">Row</text:h>
      <text:p text:style-name="P1">Organiza widgets horizontalmente.</text:p>
      <text:h text:style-name="Heading2" text:outline-level="2">Column</text:h>
      <text:p text:style-name="P1">Organiza widgets verticalmente.</text:p>
      <text:h text:style-name="Heading2" text:outline-level="2">Expanded</text:h>
      <text:p text:style-name="P1">Faz um filho ocupar o espaco disponivel dentro de Row, Column ou Flex.</text:p>
      <text:h text:style-name="Heading2" text:outline-level="2">Flexible</text:h>
      <text:p text:style-name="P1">Parecido com Expanded, mas permite que o filho ocupe menos espaco se quiser.</text:p>
      <text:h text:style-name="Heading2" text:outline-level="2">Spacer</text:h>
      <text:p text:style-name="P1">Cria um espaco flexivel vazio. Muito util para empurrar elementos, como logo a esquerda e menu a direita.</text:p>
      <text:h text:style-name="Heading2" text:outline-level="2">GridView</text:h>
      <text:p text:style-name="P1">Cria layouts em grade. Bom para cards, produtos, galerias e listas de itens.</text:p>
      <text:h text:style-name="Heading2" text:outline-level="2">AspectRatio</text:h>
      <text:p text:style-name="P1">Mantem uma proporcao fixa de largura e altura. Otimo para imagens, banners e cards.</text:p>
      <text:h text:style-name="Heading2" text:outline-level="2">FractionallySizedBox</text:h>
      <text:p text:style-name="P1">Define o tamanho de um widget por fracao do espaco disponivel, tipo 50%, 80%, etc.</text:p>
      <text:h text:style-name="Heading2" text:outline-level="2">MouseRegion</text:h>
      <text:p text:style-name="P1">Detecta entrada e saida do mouse. Serve para hover, cursor e interacoes tipicas de web.</text:p>
      <text:h text:style-name="Heading2" text:outline-level="2">InkWell</text:h>
      <text:p text:style-name="P1">Cria area clicavel com feedback visual do Material Design. Bom para botoes, cards e links clicaveis.</text:p>
      <text:h text:style-name="Heading2" text:outline-level="2">GestureDetector</text:h>
      <text:p text:style-name="P1">Detecta gestos e cliques de forma mais generica. Util quando voce nao precisa do efeito visual do Material.</text:p>
      <text:h text:style-name="Heading2" text:outline-level="2">SelectionArea</text:h>
      <text:p text:style-name="P1">Permite selecionar textos com o mouse na web, como em sites normais.</text:p>
      <text:h text:style-name="Heading2" text:outline-level="2">FittedBox</text:h>
      <text:p text:style-name="P1">Ajusta o tamanho do filho para caber no espaco disponivel. Util em casos especificos, mas precisa usar com cuidado.</text:p>
      <text:h text:style-name="Heading2" text:outline-level="2">MediaQuery</text:h>
      <text:p text:style-name="P1">Da acesso a informacoes da tela inteira, como largura, altura, orientacao e densidade.</text:p>
      <text:h text:style-name="Heading2" text:outline-level="2">SafeArea</text:h>
      <text:p text:style-name="P1">Evita areas perigosas da tela, como notch, barra de status ou areas do sistema. Mais comum no mobile, mas ainda pode ser util.</text:p>
      <text:h text:style-name="Heading2" text:outline-level="2">Padding</text:h>
      <text:p text:style-name="P1">Adiciona espacamento interno ao redor de um widget.</text:p>
      <text:h text:style-name="Heading2" text:outline-level="2">SizedBox</text:h>
      <text:p text:style-name="P1">Cria espaco fixo ou define largura/altura de um widget.</text:p>
      <text:h text:style-name="Heading2" text:outline-level="2">Container</text:h>
      <text:p text:style-name="P1">Widget geral para cor, tamanho, margem, padding, borda e decoracao. Use quando precisar combinar essas coisas.</text:p>
      <text:h text:style-name="Heading2" text:outline-level="2">DecoratedBox</text:h>
      <text:p text:style-name="P1">Aplica decoracao visual, como cor, borda e gradiente. Mais especifico que Container.</text:p>
      <text:h text:style-name="Heading2" text:outline-level="2">Stack</text:h>
      <text:p text:style-name="P1">Permite sobrepor widgets. Util para textos sobre imagens, badges, banners e composicoes visuais.</text:p>
      <text:h text:style-name="Heading2" text:outline-level="2">Positioned</text:h>
      <text:p text:style-name="P1">Usado dentro de Stack para posicionar um widget em um lugar especifico.</text:p>
      <text:h text:style-name="Heading1" text:outline-level="1">Sugestao de estudo</text:h>
      <text:p text:style-name="P1">Prioridade para treinar primeiro: Row, Column, Expanded, Spacer, ConstrainedBox, LayoutBuilder, Wrap, GridView e MouseReg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odex</meta:generator>
  </office:meta>
</office:document-meta>
</file>